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0000003908A901846.png" manifest:media-type="image/png"/>
  <manifest:file-entry manifest:full-path="Pictures/10000001000002E60000036B0E0C09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3049in" table:align="left"/>
    </style:style>
    <style:style style:name="Table1.A" style:family="table-column">
      <style:table-column-properties style:column-width="1.2736in"/>
    </style:style>
    <style:style style:name="Table1.B" style:family="table-column">
      <style:table-column-properties style:column-width="5.0313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1514in"/>
    </style:style>
    <style:style style:name="Table2.B" style:family="table-column">
      <style:table-column-properties style:column-width="4.7944in"/>
    </style:style>
    <style:style style:name="Table2.C" style:family="table-column">
      <style:table-column-properties style:column-width="0.7472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1.8271in"/>
    </style:style>
    <style:style style:name="Table3.B" style:family="table-column">
      <style:table-column-properties style:column-width="4.0056in"/>
    </style:style>
    <style:style style:name="Table3.C" style:family="table-column">
      <style:table-column-properties style:column-width="0.8604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2.2528in"/>
    </style:style>
    <style:style style:name="Table4.B" style:family="table-column">
      <style:table-column-properties style:column-width="3.5701in"/>
    </style:style>
    <style:style style:name="Table4.C" style:family="table-column">
      <style:table-column-properties style:column-width="0.8701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9458in"/>
    </style:style>
    <style:style style:name="Table5.B" style:family="table-column">
      <style:table-column-properties style:column-width="3.8701in"/>
    </style:style>
    <style:style style:name="Table5.C" style:family="table-column">
      <style:table-column-properties style:column-width="0.8771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3.0611in"/>
    </style:style>
    <style:style style:name="Table6.B" style:family="table-column">
      <style:table-column-properties style:column-width="2.7389in"/>
    </style:style>
    <style:style style:name="Table6.C" style:family="table-column">
      <style:table-column-properties style:column-width="0.8931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1.6174in"/>
    </style:style>
    <style:style style:name="Table7.B" style:family="table-column">
      <style:table-column-properties style:column-width="4.2549in"/>
    </style:style>
    <style:style style:name="Table7.C" style:family="table-column">
      <style:table-column-properties style:column-width="0.8208in"/>
    </style:style>
    <style:style style:name="Table7.A1" style:family="table-cell">
      <style:table-cell-properties style:vertical-align="middle" fo:padding="0.0194in" fo:border="none"/>
    </style:style>
    <style:style style:name="Table8" style:family="table">
      <style:table-properties style:width="5.8375in" table:align="left"/>
    </style:style>
    <style:style style:name="Table8.A" style:family="table-column">
      <style:table-column-properties style:column-width="4.7632in"/>
    </style:style>
    <style:style style:name="Table8.B" style:family="table-column">
      <style:table-column-properties style:column-width="1.0743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1.6493in"/>
    </style:style>
    <style:style style:name="Table9.B" style:family="table-column">
      <style:table-column-properties style:column-width="0.4139in"/>
    </style:style>
    <style:style style:name="Table9.C" style:family="table-column">
      <style:table-column-properties style:column-width="4.6299in"/>
    </style:style>
    <style:style style:name="Table9.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2.0222in"/>
    </style:style>
    <style:style style:name="Table10.B" style:family="table-column">
      <style:table-column-properties style:column-width="4.6708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1.1486in"/>
    </style:style>
    <style:style style:name="Table11.B" style:family="table-column">
      <style:table-column-properties style:column-width="5.5444in"/>
    </style:style>
    <style:style style:name="Table11.A1" style:family="table-cell">
      <style:table-cell-properties style:vertical-align="middle" fo:padding="0.0194in" fo:border="none"/>
    </style:style>
    <style:style style:name="P1" style:family="paragraph" style:parent-style-name="Standard">
      <style:text-properties officeooo:paragraph-rsid="0012971a"/>
    </style:style>
    <style:style style:name="P2" style:family="paragraph" style:parent-style-name="Heading_20_2">
      <style:text-properties officeooo:paragraph-rsid="0012971a"/>
    </style:style>
    <style:style style:name="P3" style:family="paragraph" style:parent-style-name="Table_20_Contents">
      <style:text-properties fo:font-size="2pt" style:font-size-asian="2pt" style:font-size-complex="2pt"/>
    </style:style>
    <style:style style:name="P4" style:family="paragraph" style:parent-style-name="Table_20_Contents">
      <style:text-properties officeooo:paragraph-rsid="00108ec4"/>
    </style:style>
    <style:style style:name="P5" style:family="paragraph" style:parent-style-name="Table_20_Contents">
      <style:text-properties officeooo:rsid="00108ec4" officeooo:paragraph-rsid="00108ec4"/>
    </style:style>
    <style:style style:name="P6" style:family="paragraph" style:parent-style-name="Table_20_Heading">
      <style:text-properties fo:font-size="2pt" style:font-size-asian="2pt" style:font-size-complex="2pt"/>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8"/>
    <style:style style:name="P22" style:family="paragraph" style:parent-style-name="Text_20_body" style:list-style-name="L8">
      <style:paragraph-properties fo:margin-top="0in" fo:margin-bottom="0in" style:contextual-spacing="false"/>
    </style:style>
    <style:style style:name="P23" style:family="paragraph" style:parent-style-name="Text_20_body" style:list-style-name="L9"/>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10"/>
    <style:style style:name="P26" style:family="paragraph" style:parent-style-name="Text_20_body" style:list-style-name="L10">
      <style:paragraph-properties fo:margin-top="0in" fo:margin-bottom="0in" style:contextual-spacing="false"/>
    </style:style>
    <style:style style:name="P27" style:family="paragraph" style:parent-style-name="Text_20_body" style:list-style-name="L11"/>
    <style:style style:name="P28" style:family="paragraph" style:parent-style-name="Text_20_body" style:list-style-name="L11">
      <style:paragraph-properties fo:margin-top="0in" fo:margin-bottom="0in" style:contextual-spacing="false"/>
    </style:style>
    <style:style style:name="P29" style:family="paragraph" style:parent-style-name="Text_20_body" style:list-style-name="L12"/>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3"/>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4"/>
    <style:style style:name="P34" style:family="paragraph" style:parent-style-name="Text_20_body" style:list-style-name="L14">
      <style:paragraph-properties fo:margin-top="0in" fo:margin-bottom="0in" style:contextual-spacing="false"/>
    </style:style>
    <style:style style:name="P35" style:family="paragraph" style:parent-style-name="Text_20_body" style:list-style-name="L15"/>
    <style:style style:name="P36" style:family="paragraph" style:parent-style-name="Text_20_body" style:list-style-name="L15">
      <style:paragraph-properties fo:margin-top="0in" fo:margin-bottom="0in" style:contextual-spacing="false"/>
    </style:style>
    <style:style style:name="P37" style:family="paragraph" style:parent-style-name="Text_20_body" style:list-style-name="L16"/>
    <style:style style:name="P38" style:family="paragraph" style:parent-style-name="Text_20_body" style:list-style-name="L16">
      <style:paragraph-properties fo:margin-top="0in" fo:margin-bottom="0in" style:contextual-spacing="false"/>
    </style:style>
    <style:style style:name="P39" style:family="paragraph" style:parent-style-name="Text_20_body" style:list-style-name="L17"/>
    <style:style style:name="P40" style:family="paragraph" style:parent-style-name="Text_20_body" style:list-style-name="L17">
      <style:paragraph-properties fo:margin-top="0in" fo:margin-bottom="0in" style:contextual-spacing="false"/>
    </style:style>
    <style:style style:name="P41" style:family="paragraph" style:parent-style-name="Text_20_body">
      <style:text-properties officeooo:paragraph-rsid="0012971a"/>
    </style:style>
    <style:style style:name="T1" style:family="text">
      <style:text-properties officeooo:rsid="00108ec4"/>
    </style:style>
    <style:style style:name="T2" style:family="text">
      <style:text-properties officeooo:rsid="0011fb30"/>
    </style:style>
    <style:style style:name="T3" style:family="text">
      <style:text-properties officeooo:rsid="0012971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penAAC: An Open, Offline, Multilingual Communication Aid Built on Arduino UNO Q</text:h>
      <text:p text:style-name="Text_20_body"><text:span text:style-name="Strong_20_Emphasis">Arduino® UNO Q </text:span><text:span text:style-name="Strong_20_Emphasis"><text:span text:style-name="T2">Prove it !</text:span></text:span><text:span text:style-name="Strong_20_Emphasis"> </text:span><text:span text:style-name="Strong_20_Emphasis"><text:span text:style-name="T2">Hackathon</text:span></text:span><text:span text:style-name="Strong_20_Emphasis"> </text:span></text:p>
      <table:table table:name="Table1" table:style-name="Table1">
        <table:table-column table:style-name="Table1.A"/>
        <table:table-column table:style-name="Table1.B"/>
        <table:table-header-rows>
          <table:table-row>
            <table:table-cell table:style-name="Table1.A1" office:value-type="string">
              <text:p text:style-name="P6"/>
            </table:table-cell>
            <table:table-cell table:style-name="Table1.A1" office:value-type="string">
              <text:p text:style-name="P6"/>
            </table:table-cell>
          </table:table-row>
        </table:table-header-rows>
        <table:table-row>
          <table:table-cell table:style-name="Table1.A1" office:value-type="string">
            <text:p text:style-name="Table_20_Contents">Challenge theme</text:p>
          </table:table-cell>
          <table:table-cell table:style-name="Table1.A1" office:value-type="string">
            <text:p text:style-name="Table_20_Contents"><text:span text:style-name="Emphasis">Human–Machine Harmony: Assistive technologies for neurodiverse users</text:span></text:p>
          </table:table-cell>
        </table:table-row>
        <table:table-row>
          <table:table-cell table:style-name="Table1.A1" office:value-type="string">
            <text:p text:style-name="Table_20_Contents">Author</text:p>
          </table:table-cell>
          <table:table-cell table:style-name="Table1.A1" office:value-type="string">
            <text:p text:style-name="P4"><text:span text:style-name="Emphasis"><text:span text:style-name="T1">Eleftherios Batzolis </text:span></text:span></text:p>
          </table:table-cell>
        </table:table-row>
        <table:table-row>
          <table:table-cell table:style-name="Table1.A1" office:value-type="string">
            <text:p text:style-name="P5">Team</text:p>
          </table:table-cell>
          <table:table-cell table:style-name="Table1.A1" office:value-type="string">
            <text:p text:style-name="P5">SystemsGenesys</text:p>
          </table:table-cell>
        </table:table-row>
        <table:table-row>
          <table:table-cell table:style-name="Table1.A1" office:value-type="string">
            <text:p text:style-name="P5">Email</text:p>
          </table:table-cell>
          <table:table-cell table:style-name="Table1.A1" office:value-type="string">
            <text:p text:style-name="P5">e.batzolis@gmail.com</text:p>
          </table:table-cell>
        </table:table-row>
        <table:table-row>
          <table:table-cell table:style-name="Table1.A1" office:value-type="string">
            <text:p text:style-name="Table_20_Contents">Location</text:p>
          </table:table-cell>
          <table:table-cell table:style-name="Table1.A1" office:value-type="string">
            <text:p text:style-name="Table_20_Contents"><text:span text:style-name="Emphasis">Greece</text:span></text:p>
          </table:table-cell>
        </table:table-row>
        <table:table-row>
          <table:table-cell table:style-name="Table1.A1" office:value-type="string">
            <text:p text:style-name="Table_20_Contents">Project repository</text:p>
          </table:table-cell>
          <table:table-cell table:style-name="Table1.A1" office:value-type="string">
            <text:p text:style-name="Table_20_Contents"><text:span text:style-name="Emphasis">https://github.com/Lefteris-B/OpenAAC</text:span></text:p>
          </table:table-cell>
        </table:table-row>
      </table:table>
      <text:p text:style-name="Horizontal_20_Line"/>
      <text:h text:style-name="Heading_20_2" text:outline-level="2">1. Problem statement and solution overview</text:h>
      <text:h text:style-name="Heading_20_3" text:outline-level="3">1.1 The problem</text:h>
      <text:p text:style-name="Text_20_body">Approximately 70 million people worldwide need Augmentative and Alternative Communication (AAC), devices that help people speak when speech is unreliable, costly, or impossible. The population includes people with cerebral palsy, autism, post-stroke aphasia, ALS, and locked-in syndrome. This population is poorly served on three axes:</text:p>
      <text:list text:style-name="L1">
        <text:list-item>
          <text:p text:style-name="P8"><text:span text:style-name="Strong_20_Emphasis">Cost.</text:span> Commercial AAC devices (Tobii Dynavox, PRC-Saltillo, Smartbox) cost €5,000–€15,000. Insurance coverage outside high-income countries is sparse; coverage for "speaking-sometimes" autistic users is sparse everywhere. </text:p>
        </text:list-item>
        <text:list-item>
          <text:p text:style-name="P8"><text:span text:style-name="Strong_20_Emphasis">Language.</text:span> Major commercial AAC ships with English, Spanish, and a small set of Western European languages. Greek, Arabic, Ukrainian, Romanian, and most languages of the Middle East and Sub-Saharan Africa are functionally unserved. A South African study found 54% of non-English-background AAC users had no access to their home language in any modality. </text:p>
        </text:list-item>
        <text:list-item>
          <text:p text:style-name="P7"><text:span text:style-name="Strong_20_Emphasis">Connectivity assumptions.</text:span> App-based AAC increasingly assumes a smartphone, an iPad, and reliable internet. None of those hold for users in rural areas, hospitals, conflict zones, or care homes that ban personal devices. </text:p>
        </text:list-item>
      </text:list>
      <text:p text:style-name="Text_20_body">The technical conservatism of commercial AAC compounds the gap: most devices still use 1990s-era n-gram word prediction, while the AAC research community has shown that BERT-class encoder models substantially outperform n-grams on next-pictogram and next-word prediction (PictoBERT, Pereira et al. 2022; PrAACT 2023; RoBERTa-AAC, Springer HCI 2023). These advances are not yet in cheap, repairable, multilingual hardware. No commercial vendor has assembled them. The design space is open , and the Arduino UNO Q, with its dual-brain architecture combining a Linux-capable AI processor with a real-time microcontroller, is uniquely positioned to fill it.</text:p>
      <text:h text:style-name="Heading_20_3" text:outline-level="3"><text:soft-page-break/>1.2 What we propose</text:h>
      <text:p text:style-name="Text_20_body"><text:span text:style-name="Strong_20_Emphasis">OpenAAC</text:span> is a battery-powered, offline communication device built around the Arduino UNO Q. The Qualcomm Dragonwing QRB2210 processor runs a custom distilled BERT-class language model (~15M parameters, distilled from a multilingual teacher) natively under Debian Linux using ONNX Runtime, while the STM32U585 microcontroller handles real-time input scanning, e-paper display refresh, and battery management telemetry. The device displays an ARASAAC pictogram grid on a 4.2" e-paper screen, accepts input via tactile buttons or a single mechanical switch, and speaks user-constructed sentences through eSpeak-NG text-to-speech. A battery management subsystem with fuel-gauging, USB-PD charging, and thermal monitoring safeguards a 2× 18650 Li-ion pack.</text:p>
      <text:p text:style-name="Text_20_body">The device is fully offline , no cloud, no microphone, no Wi-Fi during normal use. Personalisation (fine-tuning the language model on a user's own writing) happens off-device via an opt-in companion application; trained weights sync over Wi-Fi once and the radio returns to off. All hardware design, firmware, model architecture, and corpus construction methodology will be released under permissive open-source licenses.</text:p>
      <text:p text:style-name="Text_20_body"><text:span text:style-name="Strong_20_Emphasis">Scope, committed deliverable</text:span><text:span text:style-name="Strong_20_Emphasis"><text:span text:style-name="T3">s</text:span></text:span><text:span text:style-name="Strong_20_Emphasis">, stretch goal</text:span><text:span text:style-name="Strong_20_Emphasis"><text:span text:style-name="T3">s and</text:span></text:span><text:span text:style-name="Strong_20_Emphasis"> future direction</text:span><text:span text:style-name="Strong_20_Emphasis"><text:span text:style-name="T3">s</text:span></text:span><text:span text:style-name="Strong_20_Emphasis">.</text:span> The MVP is committed to one language: <text:span text:style-name="Strong_20_Emphasis">English</text:span>, fully working and fully evaluated. The system is built on a multilingual foundation (multilingual DistilBERT, ARASAAC pictograms, eSpeak-NG, swappable vocabulary lists) so that adding languages is incremental work rather than architecture work; <text:span text:style-name="Strong_20_Emphasis">Greek is tracked as a stretch goal</text:span>, because I am based in Greece and a usable Greek device would directly serve a population that no commercial AAC vendor reaches today. <text:span text:style-name="Strong_20_Emphasis">Truly multilingual deployment</text:span> , Arabic with right-to-left rendering, Ukrainian, Romanian, and other underserved languages , is framed honestly as a future research direction that the project's open-source release is designed to enable.</text:p>
      <text:p text:style-name="Text_20_body">Target unit cost: <text:span text:style-name="Strong_20_Emphasis">under €200</text:span> in single-unit BOM. Target weight: under 400 g. Target battery life: 1.5–2.5 days of typical use on a single charge.</text:p>
      <text:h text:style-name="Heading_20_3" text:outline-level="3">1.3 Why this is a "Human–Machine Harmony" project</text:h>
      <text:p text:style-name="Text_20_body">The Arduino UNO Q Community Challenge's "Human–Machine Harmony" theme calls for assistive technologies for neurodiverse users. OpenAAC answers that call directly:</text:p>
      <text:list text:style-name="L2">
        <text:list-item>
          <text:p text:style-name="P10"><text:span text:style-name="Strong_20_Emphasis">Neurodiverse users are the primary audience.</text:span> Adult autistic part-time AAC users are often abandoned by commercial AAC because the field assumes a child-coded, full-time-AAC user base. Post-stroke aphasia users need adult-vocabulary text-and-pictogram input that is faster than navigating a dense grid of unfamiliar symbols. These are the two populations the English MVP serves. </text:p>
        </text:list-item>
        <text:list-item>
          <text:p text:style-name="P10"><text:span text:style-name="Strong_20_Emphasis">The AI at the edge is the enabler.</text:span> The Dragonwing QRB2210's quad-core Cortex-A53 at 2 GHz runs a custom distilled BERT-class language model that predicts the user's next pictogram, reducing the number of button presses to construct a sentence by roughly 40–60% compared to no prediction. This on-device intelligence is what makes the device practical , without it, grid-based AAC is too slow for conversational use. </text:p>
        </text:list-item>
        <text:list-item>
          <text:p text:style-name="P9"><text:span text:style-name="Strong_20_Emphasis">The dual-brain architecture is the differentiator.</text:span> The STM32U585's real-time responsiveness ensures that button debouncing and switch scanning remain deterministic and latency-free even while the QRB2210 is running BERT inference. This split is not a <text:soft-page-break/>gimmick , it directly addresses documented AAC user complaints about input lag and missed key presses. </text:p>
        </text:list-item>
      </text:list>
      <text:h text:style-name="Heading_20_3" text:outline-level="3">1.4 Why the Arduino UNO Q is the right platform</text:h>
      <text:p text:style-name="Text_20_body">The UNO Q's dual-brain design is an almost ideal fit for this application:</text:p>
      <text:p text:style-name="Text_20_body"><text:span text:style-name="Strong_20_Emphasis">The QRB2210 (Linux MPU) handles the AI-heavy work.</text:span> With 2 GB of LPDDR4 RAM and a quad-core Cortex-A53 at 2 GHz, the QRB2210 runs a custom distilled BERT model (~15M parameters, ~15 MB in INT8) natively under Debian Linux using ONNX Runtime. While the Cortex-A53 is not fast enough to run a full 66M-parameter DistilBERT at interactive speeds (which would take 1–3 seconds per inference on this hardware), a purpose-built smaller model , 6 transformer layers, 384 hidden dimensions, 6 attention heads , achieves sub-500 ms inference while retaining the accuracy benefits of transformer-based prediction over n-gram baselines. This is a deliberate middle ground: the UNO Q has enough RAM and compute to avoid the extreme MCUBERT-class compression required on bare microcontrollers (which sacrifices accuracy), while the AAC task's 1000-class output head does not require full DistilBERT capacity. eSpeak-NG text-to-speech runs natively in Linux, producing audio output without any porting effort. Python-based personalisation scripts run directly on the board during the one-time weight-sync step.</text:p>
      <text:p text:style-name="Text_20_body"><text:span text:style-name="Strong_20_Emphasis">The STM32U585 (real-time MCU) handles the safety-critical and latency-sensitive work.</text:span> Button debouncing, switch-scanning state machines, e-paper SPI refresh commands, and battery telemetry (via I²C to the fuel gauge IC) all run on the MCU's Zephyr RTOS with deterministic timing. This means the AAC input system never blocks on Linux scheduler latency , a critical requirement for users with motor impairments who depend on precise scan timing.</text:p>
      <text:p text:style-name="Text_20_body"><text:span text:style-name="Strong_20_Emphasis">The Arduino Bridge library connects both sides.</text:span> The QRB2210 sends prediction results to the STM32U585 for display update; the STM32U585 sends button events to the QRB2210 for BERT inference. The RPC-based Bridge library handles this transparently.</text:p>
      <text:p text:style-name="Text_20_body"><text:span text:style-name="Strong_20_Emphasis">The UNO form factor and ecosystem simplify hardware development.</text:span> Arduino-compatible headers, Qwiic connector for expansion, 16 GB eMMC for model and pictogram storage, and built-in Wi-Fi 5 for the one-time personalisation sync , all features that would otherwise require custom PCB design.</text:p>
      <text:p text:style-name="Text_20_body"><text:span text:style-name="Strong_20_Emphasis">Cost.</text:span> The UNO Q 2 GB retails for approximately €48, providing compute capabilities that would otherwise require a custom PCB with a QRB2210, DDR, eMMC, and power management , easily a €100+ design at prototype volumes.</text:p>
      <text:p text:style-name="Horizontal_20_Line"/>
      <text:h text:style-name="Heading_20_2" text:outline-level="2">2. Hardware design</text:h>
      <text:p text:style-name="Text_20_body">The hardware consists of the Arduino UNO Q as the compute core, surrounded by four peripheral subsystems connected via the UNO headers, Qwiic, and GPIO. Figure 1 (<text:span text:style-name="Emphasis">to be inserted</text:span>) shows the block-level architecture.</text:p>
      <text:h text:style-name="Heading_20_3" text:outline-level="3"><text:soft-page-break/>2.1 Compute cor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mponent</text:p>
            </table:table-cell>
            <table:table-cell table:style-name="Table2.A1" office:value-type="string">
              <text:p text:style-name="Table_20_Heading">Role</text:p>
            </table:table-cell>
            <table:table-cell table:style-name="Table2.A1" office:value-type="string">
              <text:p text:style-name="Table_20_Heading">Approx. cost</text:p>
            </table:table-cell>
          </table:table-row>
        </table:table-header-rows>
        <table:table-row>
          <table:table-cell table:style-name="Table2.A1" office:value-type="string">
            <text:p text:style-name="Table_20_Contents">Arduino UNO Q (2 GB variant)</text:p>
          </table:table-cell>
          <table:table-cell table:style-name="Table2.A1" office:value-type="string">
            <text:p text:style-name="Table_20_Contents">Main compute platform. QRB2210 MPU runs BERT inference, TTS, and UI logic under Debian Linux. STM32U585 MCU runs real-time input handling, e-paper SPI, and battery telemetry on Zephyr RTOS. 16 GB eMMC stores model, pictograms, eSpeak voices, and OS. Built-in Wi-Fi 5 for one-time personalisation sync.</text:p>
          </table:table-cell>
          <table:table-cell table:style-name="Table2.A1" office:value-type="string">
            <text:p text:style-name="Table_20_Contents">€48</text:p>
          </table:table-cell>
        </table:table-row>
      </table:table>
      <text:p text:style-name="Text_20_body">The 2 GB variant is chosen over the 4 GB to minimise cost and power draw. The custom BERT model in INT8 quantisation requires approximately 15 MB of working memory plus ~50 MB for runtime buffers; even with the Debian OS overhead (~300–400 MB resident), 2 GB provides ample headroom. The 16 GB eMMC holds the Debian OS (~3 GB), the model (~15 MB), the ARASAAC pictogram set (~50 MB for 1000 pre-rendered 1-bit images), eSpeak voice data (~20 MB), and application code with room to spare.</text:p>
      <text:h text:style-name="Heading_20_3" text:outline-level="3">2.2 Battery management subsystem</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mponent</text:p>
            </table:table-cell>
            <table:table-cell table:style-name="Table3.A1" office:value-type="string">
              <text:p text:style-name="Table_20_Heading">Role</text:p>
            </table:table-cell>
            <table:table-cell table:style-name="Table3.A1" office:value-type="string">
              <text:p text:style-name="Table_20_Heading">Approx. cost</text:p>
            </table:table-cell>
          </table:table-row>
        </table:table-header-rows>
        <table:table-row>
          <table:table-cell table:style-name="Table3.A1" office:value-type="string">
            <text:p text:style-name="Table_20_Contents">MAX17320</text:p>
          </table:table-cell>
          <table:table-cell table:style-name="Table3.A1" office:value-type="string">
            <text:p text:style-name="Table_20_Contents">2S Li-ion fuel gauge with internal cell-balancing FETs and ModelGauge m5 EZ algorithm</text:p>
          </table:table-cell>
          <table:table-cell table:style-name="Table3.A1" office:value-type="string">
            <text:p text:style-name="Table_20_Contents">€6</text:p>
          </table:table-cell>
        </table:table-row>
        <table:table-row>
          <table:table-cell table:style-name="Table3.A1" office:value-type="string">
            <text:p text:style-name="Table_20_Contents">MP2731</text:p>
          </table:table-cell>
          <table:table-cell table:style-name="Table3.A1" office:value-type="string">
            <text:p text:style-name="Table_20_Contents">USB-PD-aware buck-boost charger; negotiates input voltage, manages charge profile</text:p>
          </table:table-cell>
          <table:table-cell table:style-name="Table3.A1" office:value-type="string">
            <text:p text:style-name="Table_20_Contents">€3</text:p>
          </table:table-cell>
        </table:table-row>
        <table:table-row>
          <table:table-cell table:style-name="Table3.A1" office:value-type="string">
            <text:p text:style-name="Table_20_Contents">TPS62A02</text:p>
          </table:table-cell>
          <table:table-cell table:style-name="Table3.A1" office:value-type="string">
            <text:p text:style-name="Table_20_Contents">Buck regulator producing 5 V rail for UNO Q (the board requires 5 V / 3 A for full performance)</text:p>
          </table:table-cell>
          <table:table-cell table:style-name="Table3.A1" office:value-type="string">
            <text:p text:style-name="Table_20_Contents">€2</text:p>
          </table:table-cell>
        </table:table-row>
        <table:table-row>
          <table:table-cell table:style-name="Table3.A1" office:value-type="string">
            <text:p text:style-name="Table_20_Contents">INA226</text:p>
          </table:table-cell>
          <table:table-cell table:style-name="Table3.A1" office:value-type="string">
            <text:p text:style-name="Table_20_Contents">Bidirectional current/voltage monitor on battery output</text:p>
          </table:table-cell>
          <table:table-cell table:style-name="Table3.A1" office:value-type="string">
            <text:p text:style-name="Table_20_Contents">€2</text:p>
          </table:table-cell>
        </table:table-row>
        <table:table-row>
          <table:table-cell table:style-name="Table3.A1" office:value-type="string">
            <text:p text:style-name="Table_20_Contents">External N-FET cell protection circuit</text:p>
          </table:table-cell>
          <table:table-cell table:style-name="Table3.A1" office:value-type="string">
            <text:p text:style-name="Table_20_Contents">Hardware-level overcurrent and short-circuit safety</text:p>
          </table:table-cell>
          <table:table-cell table:style-name="Table3.A1" office:value-type="string">
            <text:p text:style-name="Table_20_Contents">€2</text:p>
          </table:table-cell>
        </table:table-row>
        <table:table-row>
          <table:table-cell table:style-name="Table3.A1" office:value-type="string">
            <text:p text:style-name="Table_20_Contents">2× NTC thermistors</text:p>
          </table:table-cell>
          <table:table-cell table:style-name="Table3.A1" office:value-type="string">
            <text:p text:style-name="Table_20_Contents">Battery and charger thermal monitoring</text:p>
          </table:table-cell>
          <table:table-cell table:style-name="Table3.A1" office:value-type="string">
            <text:p text:style-name="Table_20_Contents">€0.50</text:p>
          </table:table-cell>
        </table:table-row>
      </table:table>
      <text:p text:style-name="Text_20_body">The STM32U585 on the UNO Q reads battery telemetry from the MAX17320 and INA226 over I²C, monitors NTC temperatures via ADC, and controls the MP2731 charge profile , all running on the MCU's Zephyr side with deterministic timing. The MCU can signal the Linux side to enter suspend when battery is low, and wake it on button press. This approach leverages the UNO Q's built-in dual-brain architecture: the STM32U585's low-power stop mode (~2.5 µA) keeps battery monitoring alive even when the Linux side is suspended.</text:p>
      <text:h text:style-name="Heading_20_3" text:outline-level="3">2.3 Display and audio subsystem</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Component</text:p>
            </table:table-cell>
            <table:table-cell table:style-name="Table4.A1" office:value-type="string">
              <text:p text:style-name="Table_20_Heading">Role</text:p>
            </table:table-cell>
            <table:table-cell table:style-name="Table4.A1" office:value-type="string">
              <text:p text:style-name="Table_20_Heading">Approx. cost</text:p>
            </table:table-cell>
          </table:table-row>
        </table:table-header-rows>
        <table:table-row>
          <table:table-cell table:style-name="Table4.A1" office:value-type="string">
            <text:p text:style-name="Table_20_Contents">Waveshare 4.2" e-paper module, 400×300, B/W</text:p>
          </table:table-cell>
          <table:table-cell table:style-name="Table4.A1" office:value-type="string">
            <text:p text:style-name="Table_20_Contents">Main display; zero current when not refreshing; readable in sunlight</text:p>
          </table:table-cell>
          <table:table-cell table:style-name="Table4.A1" office:value-type="string">
            <text:p text:style-name="Table_20_Contents">€23</text:p>
          </table:table-cell>
        </table:table-row>
        <table:table-row>
          <table:table-cell table:style-name="Table4.A1" office:value-type="string">
            <text:p text:style-name="Table_20_Contents">USB audio adapter (USB-C to 3.5 mm DAC)</text:p>
          </table:table-cell>
          <table:table-cell table:style-name="Table4.A1" office:value-type="string">
            <text:p text:style-name="Table_20_Contents">Routes eSpeak-NG audio from QRB2210's USB subsystem to the speaker amplifier</text:p>
          </table:table-cell>
          <table:table-cell table:style-name="Table4.A1" office:value-type="string">
            <text:p text:style-name="Table_20_Contents">€3</text:p>
          </table:table-cell>
        </table:table-row>
        <table:table-row>
          <table:table-cell table:style-name="Table4.A1" office:value-type="string">
            <text:p text:style-name="Table_20_Contents">PAM8403 Class-D audio amplifier module</text:p>
          </table:table-cell>
          <table:table-cell table:style-name="Table4.A1" office:value-type="string">
            <text:p text:style-name="Table_20_Contents">Amplifies line-level audio from USB DAC to drive speaker</text:p>
          </table:table-cell>
          <table:table-cell table:style-name="Table4.A1" office:value-type="string">
            <text:p text:style-name="Table_20_Contents">€1.50</text:p>
          </table:table-cell>
        </table:table-row>
        <table:table-row>
          <table:table-cell table:style-name="Table4.A1" office:value-type="string">
            <text:p text:style-name="Table_20_Contents">Small 4 Ω, 3 W speaker</text:p>
          </table:table-cell>
          <table:table-cell table:style-name="Table4.A1" office:value-type="string">
            <text:p text:style-name="Table_20_Contents">Front-firing for clarity</text:p>
          </table:table-cell>
          <table:table-cell table:style-name="Table4.A1" office:value-type="string">
            <text:p text:style-name="Table_20_Contents">€4</text:p>
          </table:table-cell>
        </table:table-row>
      </table:table>
      <text:p text:style-name="Text_20_body"><text:soft-page-break/>E-paper is essential for battery life , its zero-idle-current property dominates in a device that spends most of its time displaying a static grid. The STM32U585 handles the SPI refresh commands to the e-paper controller with precise timing, receiving display update commands (pictogram IDs and grid positions, not raw framebuffer data) from the Linux side via the Bridge RPC , this keeps Bridge traffic to a few hundred bytes per update rather than a full 15 KB framebuffer.</text:p>
      <text:p text:style-name="Text_20_body"><text:span text:style-name="Strong_20_Emphasis">Audio routing note.</text:span> The QRB2210's native audio endpoints are on the JMISC bottom-side connector, which requires either the Arduino UNO Media Carrier (announced March 2026, provides 3.5 mm jacks) or a custom JMISC breakout board. For the MVP, we use a USB audio adapter connected to the QRB2210's USB-C subsystem via an internal hub, which is simpler and works immediately with standard ALSA drivers. If the UNO Media Carrier becomes available during the build phase, the design can migrate to the JMISC analog audio path for lower component count.</text:p>
      <text:h text:style-name="Heading_20_3" text:outline-level="3">2.4 Input subsystem</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omponent</text:p>
            </table:table-cell>
            <table:table-cell table:style-name="Table5.A1" office:value-type="string">
              <text:p text:style-name="Table_20_Heading">Role</text:p>
            </table:table-cell>
            <table:table-cell table:style-name="Table5.A1" office:value-type="string">
              <text:p text:style-name="Table_20_Heading">Approx. cost</text:p>
            </table:table-cell>
          </table:table-row>
        </table:table-header-rows>
        <table:table-row>
          <table:table-cell table:style-name="Table5.A1" office:value-type="string">
            <text:p text:style-name="Table_20_Contents">11 tactile momentary switches</text:p>
          </table:table-cell>
          <table:table-cell table:style-name="Table5.A1" office:value-type="string">
            <text:p text:style-name="Table_20_Contents">5 prediction-slot buttons, 5-key d-pad with OK, 3 function buttons (home, back, speak)</text:p>
          </table:table-cell>
          <table:table-cell table:style-name="Table5.A1" office:value-type="string">
            <text:p text:style-name="Table_20_Contents">€3</text:p>
          </table:table-cell>
        </table:table-row>
        <table:table-row>
          <table:table-cell table:style-name="Table5.A1" office:value-type="string">
            <text:p text:style-name="Table_20_Contents">3.5 mm mono jack for switch scanning</text:p>
          </table:table-cell>
          <table:table-cell table:style-name="Table5.A1" office:value-type="string">
            <text:p text:style-name="Table_20_Contents">Single-switch input for users with severe motor impairment</text:p>
          </table:table-cell>
          <table:table-cell table:style-name="Table5.A1" office:value-type="string">
            <text:p text:style-name="Table_20_Contents">€1</text:p>
          </table:table-cell>
        </table:table-row>
        <table:table-row>
          <table:table-cell table:style-name="Table5.A1" office:value-type="string">
            <text:p text:style-name="Table_20_Contents">Power switch</text:p>
          </table:table-cell>
          <table:table-cell table:style-name="Table5.A1" office:value-type="string">
            <text:p text:style-name="Table_20_Contents">Primary on/off</text:p>
          </table:table-cell>
          <table:table-cell table:style-name="Table5.A1" office:value-type="string">
            <text:p text:style-name="Table_20_Contents">€0.50</text:p>
          </table:table-cell>
        </table:table-row>
        <table:table-row>
          <table:table-cell table:style-name="Table5.A1" office:value-type="string">
            <text:p text:style-name="Table_20_Contents">Status LED</text:p>
          </table:table-cell>
          <table:table-cell table:style-name="Table5.A1" office:value-type="string">
            <text:p text:style-name="Table_20_Contents">Charging / system status</text:p>
          </table:table-cell>
          <table:table-cell table:style-name="Table5.A1" office:value-type="string">
            <text:p text:style-name="Table_20_Contents">€0.30</text:p>
          </table:table-cell>
        </table:table-row>
      </table:table>
      <text:p text:style-name="Text_20_body">All buttons connect to the STM32U585's GPIO pins via the UNO headers. The MCU debounces inputs and runs the switch-scanning state machine in Zephyr, then sends events to the Linux side via the Bridge RPC. This guarantees deterministic input timing regardless of Linux scheduler load , critical for single-switch scanning, where a 50 ms timing error means a missed selection.</text:p>
      <text:h text:style-name="Heading_20_3" text:outline-level="3">2.5 Power subsystem</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omponent</text:p>
            </table:table-cell>
            <table:table-cell table:style-name="Table6.A1" office:value-type="string">
              <text:p text:style-name="Table_20_Heading">Role</text:p>
            </table:table-cell>
            <table:table-cell table:style-name="Table6.A1" office:value-type="string">
              <text:p text:style-name="Table_20_Heading">Approx. cost</text:p>
            </table:table-cell>
          </table:table-row>
        </table:table-header-rows>
        <table:table-row>
          <table:table-cell table:style-name="Table6.A1" office:value-type="string">
            <text:p text:style-name="Table_20_Contents">2× 18650 Li-ion cells (used, valued at market price)</text:p>
          </table:table-cell>
          <table:table-cell table:style-name="Table6.A1" office:value-type="string">
            <text:p text:style-name="Table_20_Contents">2S configuration, ~7.4 V nominal, ~3000 mAh per cell</text:p>
          </table:table-cell>
          <table:table-cell table:style-name="Table6.A1" office:value-type="string">
            <text:p text:style-name="Table_20_Contents">€10</text:p>
          </table:table-cell>
        </table:table-row>
        <table:table-row>
          <table:table-cell table:style-name="Table6.A1" office:value-type="string">
            <text:p text:style-name="Table_20_Contents">2-cell 18650 holder</text:p>
          </table:table-cell>
          <table:table-cell table:style-name="Table6.A1" office:value-type="string">
            <text:p text:style-name="Table_20_Contents">Mechanical mounting</text:p>
          </table:table-cell>
          <table:table-cell table:style-name="Table6.A1" office:value-type="string">
            <text:p text:style-name="Table_20_Contents">€2</text:p>
          </table:table-cell>
        </table:table-row>
        <table:table-row>
          <table:table-cell table:style-name="Table6.A1" office:value-type="string">
            <text:p text:style-name="Table_20_Contents">USB-C connector with PD support, ESD protection, TVS array</text:p>
          </table:table-cell>
          <table:table-cell table:style-name="Table6.A1" office:value-type="string">
            <text:p text:style-name="Table_20_Contents">Charging input</text:p>
          </table:table-cell>
          <table:table-cell table:style-name="Table6.A1" office:value-type="string">
            <text:p text:style-name="Table_20_Contents">€2</text:p>
          </table:table-cell>
        </table:table-row>
      </table:table>
      <text:p text:style-name="Text_20_body">The UNO Q requires 5 V / 3 A for full performance. The TPS62A02 buck regulator steps down from the 2S Li-ion pack (~6.0–8.4 V) to a stable 5 V rail. Independent power measurements (Jeff Geerling, October 2025) show the UNO Q draws approximately 0.5 W at idle and 1.9–2.5 W under sustained compute load. AAC use is bursty , brief inference bursts (~0.5 s at ~2 W) separated by seconds-to-minutes of idle waiting for user input (~0.5 W) , so average active-use power is estimated at 0.7–1.0 W. With a 22 Wh battery pack and 8 hours active / 16 hours idle per day (0.5 W, or lower if Linux suspend-to-RAM is achievable on the QRB2210), the device targets 1.5–2.5 days per charge depending on usage intensity and suspend effectiveness. Linux suspend on mobile Qualcomm SoCs is architecturally supported but not yet verified on the UNO Q's Debian distribution; this is tracked as a build-phase validation task.</text:p>
      <text:h text:style-name="Heading_20_3" text:outline-level="3"><text:soft-page-break/>2.6 Mechanical / enclosure</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Role</text:p>
            </table:table-cell>
            <table:table-cell table:style-name="Table7.A1" office:value-type="string">
              <text:p text:style-name="Table_20_Heading">Approx. cost</text:p>
            </table:table-cell>
          </table:table-row>
        </table:table-header-rows>
        <table:table-row>
          <table:table-cell table:style-name="Table7.A1" office:value-type="string">
            <text:p text:style-name="Table_20_Contents">Custom 3D-printed enclosure (PETG)</text:p>
          </table:table-cell>
          <table:table-cell table:style-name="Table7.A1" office:value-type="string">
            <text:p text:style-name="Table_20_Contents">Front face with screen window and button cutouts; UNO Q mounting, rear-mounted battery compartment; emergency paper card slot</text:p>
          </table:table-cell>
          <table:table-cell table:style-name="Table7.A1" office:value-type="string">
            <text:p text:style-name="Table_20_Contents">€5</text:p>
          </table:table-cell>
        </table:table-row>
        <table:table-row>
          <table:table-cell table:style-name="Table7.A1" office:value-type="string">
            <text:p text:style-name="Table_20_Contents">Gaskets and port covers</text:p>
          </table:table-cell>
          <table:table-cell table:style-name="Table7.A1" office:value-type="string">
            <text:p text:style-name="Table_20_Contents">IP54-target ingress protection</text:p>
          </table:table-cell>
          <table:table-cell table:style-name="Table7.A1" office:value-type="string">
            <text:p text:style-name="Table_20_Contents">€2</text:p>
          </table:table-cell>
        </table:table-row>
        <table:table-row>
          <table:table-cell table:style-name="Table7.A1" office:value-type="string">
            <text:p text:style-name="Table_20_Contents">Hardware (screws, threaded inserts)</text:p>
          </table:table-cell>
          <table:table-cell table:style-name="Table7.A1" office:value-type="string">
            <text:p text:style-name="P3"/>
          </table:table-cell>
          <table:table-cell table:style-name="Table7.A1" office:value-type="string">
            <text:p text:style-name="Table_20_Contents">€2</text:p>
          </table:table-cell>
        </table:table-row>
      </table:table>
      <text:p text:style-name="Text_20_body">The UNO form factor simplifies mechanical design , the board's standard mounting holes and header positions are well-documented. The enclosure design will be released as printable STL files.</text:p>
      <text:h text:style-name="Heading_20_3" text:outline-level="3">2.7 BOM summary</text:h>
      <table:table table:name="Table8" table:style-name="Table8">
        <table:table-column table:style-name="Table8.A"/>
        <table:table-column table:style-name="Table8.B"/>
        <table:table-header-rows>
          <table:table-row>
            <table:table-cell table:style-name="Table8.A1" office:value-type="string">
              <text:p text:style-name="Table_20_Heading">Subsystem</text:p>
            </table:table-cell>
            <table:table-cell table:style-name="Table8.A1" office:value-type="string">
              <text:p text:style-name="Table_20_Heading">Cost</text:p>
            </table:table-cell>
          </table:table-row>
        </table:table-header-rows>
        <table:table-row>
          <table:table-cell table:style-name="Table8.A1" office:value-type="string">
            <text:p text:style-name="Table_20_Contents">Compute (Arduino UNO Q 2 GB)</text:p>
          </table:table-cell>
          <table:table-cell table:style-name="Table8.A1" office:value-type="string">
            <text:p text:style-name="Table_20_Contents">€48</text:p>
          </table:table-cell>
        </table:table-row>
        <table:table-row>
          <table:table-cell table:style-name="Table8.A1" office:value-type="string">
            <text:p text:style-name="Table_20_Contents">Battery management (fuel gauge + charger + protection + monitoring)</text:p>
          </table:table-cell>
          <table:table-cell table:style-name="Table8.A1" office:value-type="string">
            <text:p text:style-name="Table_20_Contents">€15.50</text:p>
          </table:table-cell>
        </table:table-row>
        <table:table-row>
          <table:table-cell table:style-name="Table8.A1" office:value-type="string">
            <text:p text:style-name="Table_20_Contents">Display + audio</text:p>
          </table:table-cell>
          <table:table-cell table:style-name="Table8.A1" office:value-type="string">
            <text:p text:style-name="Table_20_Contents">€31.50</text:p>
          </table:table-cell>
        </table:table-row>
        <table:table-row>
          <table:table-cell table:style-name="Table8.A1" office:value-type="string">
            <text:p text:style-name="Table_20_Contents">Inputs</text:p>
          </table:table-cell>
          <table:table-cell table:style-name="Table8.A1" office:value-type="string">
            <text:p text:style-name="Table_20_Contents">€4.80</text:p>
          </table:table-cell>
        </table:table-row>
        <table:table-row>
          <table:table-cell table:style-name="Table8.A1" office:value-type="string">
            <text:p text:style-name="Table_20_Contents">Power (cells, holder, USB-C, buck regulator)</text:p>
          </table:table-cell>
          <table:table-cell table:style-name="Table8.A1" office:value-type="string">
            <text:p text:style-name="Table_20_Contents">€14</text:p>
          </table:table-cell>
        </table:table-row>
        <table:table-row>
          <table:table-cell table:style-name="Table8.A1" office:value-type="string">
            <text:p text:style-name="Table_20_Contents">Enclosure and mechanicals</text:p>
          </table:table-cell>
          <table:table-cell table:style-name="Table8.A1" office:value-type="string">
            <text:p text:style-name="Table_20_Contents">€9</text:p>
          </table:table-cell>
        </table:table-row>
        <table:table-row>
          <table:table-cell table:style-name="Table8.A1" office:value-type="string">
            <text:p text:style-name="Table_20_Contents">Custom carrier board / shield (PCB fabrication, JLCPCB-class)</text:p>
          </table:table-cell>
          <table:table-cell table:style-name="Table8.A1" office:value-type="string">
            <text:p text:style-name="Table_20_Contents">€20</text:p>
          </table:table-cell>
        </table:table-row>
        <table:table-row>
          <table:table-cell table:style-name="Table8.A1" office:value-type="string">
            <text:p text:style-name="Table_20_Contents">Reserve for component substitution</text:p>
          </table:table-cell>
          <table:table-cell table:style-name="Table8.A1" office:value-type="string">
            <text:p text:style-name="Table_20_Contents">€20</text:p>
          </table:table-cell>
        </table:table-row>
        <table:table-row>
          <table:table-cell table:style-name="Table8.A1" office:value-type="string">
            <text:p text:style-name="Table_20_Contents"><text:span text:style-name="Strong_20_Emphasis">Total</text:span></text:p>
          </table:table-cell>
          <table:table-cell table:style-name="Table8.A1" office:value-type="string">
            <text:p text:style-name="Table_20_Contents"><text:span text:style-name="Strong_20_Emphasis">~€161 / ~$175</text:span></text:p>
          </table:table-cell>
        </table:table-row>
      </table:table>
      <text:p text:style-name="Text_20_body">The custom carrier board is an Arduino shield that hosts the BMS ICs, e-paper connector, audio amplifier, button connectors, and 3.5 mm jack , stacking directly onto the UNO Q's headers. This avoids a custom main PCB entirely, leveraging the UNO ecosystem's modularity.</text:p>
      <text:p text:style-name="Horizontal_20_Line"/>
      <text:h text:style-name="Heading_20_2" text:outline-level="2">3. Software design</text:h>
      <text:h text:style-name="Heading_20_3" text:outline-level="3">3.1 System architecture</text:h>
      <text:p text:style-name="Text_20_body">The software architecture exploits the UNO Q's dual-brain split: the QRB2210 runs the AI and application logic under Debian Linux, while the STM32U585 runs the real-time I/O firmware on Zephyr RTOS. The Arduino Bridge library provides the RPC link between the two.</text:p>
      <text:p text:style-name="Text_20_body"><text:span text:style-name="Strong_20_Emphasis">On the QRB2210 (Linux / Python):</text:span></text:p>
      <text:list text:style-name="L3">
        <text:list-item>
          <text:p text:style-name="P12"><text:span text:style-name="Strong_20_Emphasis">BERT inference engine.</text:span> Custom distilled BERT model (6 layers, 384 hidden, 6 heads, ~15M parameters) loaded via ONNX Runtime with INT8 quantisation. On each user selection, runs forward inference and returns top-5 next-pictogram predictions over the 1000-class vocabulary. Inference time target: &lt;500 ms on the Cortex-A53 cluster. Note: full DistilBERT-base (66M parameters) was evaluated and rejected , it runs at 1–3 seconds per inference on the A53, which is too slow for interactive AAC use. </text:p>
        </text:list-item>
        <text:list-item>
          <text:p text:style-name="P12"><text:soft-page-break/><text:span text:style-name="Strong_20_Emphasis">UI manager.</text:span> Python application that maintains screen state, determines which pictograms and text to display at which grid positions, and sends compact display-update commands (pictogram IDs, positions, text strings) to the MCU for e-paper refresh. The MCU composites the display locally from pre-stored bitmap tiles, avoiding the need to transfer full 15 KB framebuffers over the Bridge RPC. </text:p>
        </text:list-item>
        <text:list-item>
          <text:p text:style-name="P12"><text:span text:style-name="Strong_20_Emphasis">Sentence buffer.</text:span> Manages the user's in-progress utterance , pictogram IDs and assembled text. </text:p>
        </text:list-item>
        <text:list-item>
          <text:p text:style-name="P12"><text:span text:style-name="Strong_20_Emphasis">TTS engine.</text:span> eSpeak-NG (GPL v3) runs natively on Linux; generates WAV audio and routes to the USB audio adapter via ALSA. </text:p>
        </text:list-item>
        <text:list-item>
          <text:p text:style-name="P12"><text:span text:style-name="Strong_20_Emphasis">Persistence layer.</text:span> Reads/writes user vocabulary, recently-used cache, and personalisation weights from eMMC. </text:p>
        </text:list-item>
        <text:list-item>
          <text:p text:style-name="P12"><text:span text:style-name="Strong_20_Emphasis">Personalisation.</text:span> On-device Python scripts accept user writing samples and fine-tune the final 2 layers and output head. Runs during a one-time setup session. </text:p>
        </text:list-item>
        <text:list-item>
          <text:p text:style-name="P11"><text:span text:style-name="Strong_20_Emphasis">Power management.</text:span> Receives battery state from the MCU via Bridge; manages Linux suspend/resume based on idle timeout. </text:p>
        </text:list-item>
      </text:list>
      <text:p text:style-name="Text_20_body"><text:span text:style-name="Strong_20_Emphasis">On the STM32U585 (Zephyr RTOS / Arduino sketch):</text:span></text:p>
      <text:list text:style-name="L4">
        <text:list-item>
          <text:p text:style-name="P14"><text:span text:style-name="Strong_20_Emphasis">Input handler.</text:span> Debounces buttons on GPIO; runs switch-scanning state machine when 3.5 mm jack is connected; sends events to Linux via Bridge RPC. </text:p>
        </text:list-item>
        <text:list-item>
          <text:p text:style-name="P14"><text:span text:style-name="Strong_20_Emphasis">E-paper driver.</text:span> Stores pre-rendered 1-bit pictogram bitmaps in MCU-accessible flash; receives display update commands (pictogram IDs and grid positions) from Linux via Bridge RPC; composites the screen locally and drives SPI partial and full refreshes with precise timing; manages ghosting accumulation counter. </text:p>
        </text:list-item>
        <text:list-item>
          <text:p text:style-name="P14"><text:span text:style-name="Strong_20_Emphasis">Battery telemetry.</text:span> Reads MAX17320 (cell voltage, SOC) and INA226 (current) over I²C; reads NTC temperatures via ADC; controls MP2731 charge profile; reports state to Linux via Bridge. </text:p>
        </text:list-item>
        <text:list-item>
          <text:p text:style-name="P13"><text:span text:style-name="Strong_20_Emphasis">Wake/sleep control.</text:span> Detects button press or switch-jack activity; wakes Linux from suspend; triggers suspend on idle timeout. </text:p>
        </text:list-item>
      </text:list>
      <text:h text:style-name="Heading_20_3" text:outline-level="3">3.2 Language model</text:h>
      <text:p text:style-name="Text_20_body"><text:span text:style-name="Strong_20_Emphasis">Architecture.</text:span> A custom 6-layer transformer encoder distilled from <text:span text:style-name="Source_20_Text">distilbert-base-multilingual-cased</text:span> (Apache 2.0). Hidden size 384, 6 attention heads, FFN intermediate 1536, ~15M parameters before quantisation, ~15 MB after INT8 post-training quantisation. The output head is a 1000-way classifier over the pictogram vocabulary (700 fixed core + 300 user-customisable slots). Sequence length 32 tokens , AAC utterances are short and this limits compute.</text:p>
      <text:p text:style-name="Text_20_body"><text:span text:style-name="Strong_20_Emphasis">Why not full DistilBERT?</text:span> The full 66M-parameter DistilBERT-base (768 hidden, 12 heads) takes 1–3 seconds per inference on the QRB2210's Cortex-A53 cores , too slow for interactive use. The custom smaller architecture targets sub-500 ms inference while still substantially outperforming n-gram baselines. This is a meaningful advantage over the pure-MCU approach (which requires compressing BERT to ~3 MB / 6.5M parameters with significant accuracy loss); the UNO Q's Linux environment allows a model 2–3× larger than what fits on a microcontroller, with FP32 or INT8 inference rather than aggressive bit-packing.</text:p>
      <text:p text:style-name="Text_20_body"><text:span text:style-name="Strong_20_Emphasis">Training pipeline (off-device, before build phase):</text:span></text:p>
      <text:list text:style-name="L5">
        <text:list-item>
          <text:p text:style-name="P16"><text:soft-page-break/><text:span text:style-name="Strong_20_Emphasis">Teacher model.</text:span> <text:span text:style-name="Source_20_Text">distilbert-base-multilingual-cased</text:span> (Apache 2.0, 66M parameters), used as the distillation teacher. The multilingual teacher preserves the option to add Greek and other languages without retraining from scratch. </text:p>
        </text:list-item>
        <text:list-item>
          <text:p text:style-name="P16"><text:span text:style-name="Strong_20_Emphasis">Student distillation.</text:span> The 6-layer, 384-hidden student is trained to match the teacher's logits and embeddings on English Wikipedia and CHILDES corpora. Loss: KL divergence on logits + cosine embedding loss. Estimated training time on an NVIDIA RTX 2080 Super: ~12 hours. </text:p>
        </text:list-item>
        <text:list-item>
          <text:p text:style-name="P16"><text:span text:style-name="Strong_20_Emphasis">Vocabulary reduction.</text:span> Following the Geotrend "Load What You Need" methodology (arXiv:2010.05609), reduce the 110K-token multilingual vocabulary to ~6K English-only WordPiece tokens for the MVP, collapsing the embedding table. The same procedure applied to English+Greek tokens (~8K) produces the stretch-goal model with no architectural change. </text:p>
        </text:list-item>
        <text:list-item>
          <text:p text:style-name="P16"><text:span text:style-name="Strong_20_Emphasis">AAC fine-tuning.</text:span> Replace the MLM head with the 1000-way pictogram classification head; fine-tune on the AAC-specific corpus. Estimated time: ~4 hours. </text:p>
        </text:list-item>
        <text:list-item>
          <text:p text:style-name="P15"><text:span text:style-name="Strong_20_Emphasis">Quantisation.</text:span> Post-training INT8 quantisation via ONNX Runtime; verify ≤3 percentage point drop in top-5 accuracy. <text:span text:style-name="Strong_20_Emphasis">Latency validation:</text:span> first on-device inference benchmark must be run in week 2 of the build phase; if latency exceeds 500 ms, further layer or dimension pruning will be applied. </text:p>
        </text:list-item>
      </text:list>
      <text:p text:style-name="Text_20_body"><text:span text:style-name="Strong_20_Emphasis">Corpus construction.</text:span> AAC utterances have a register that does not appear at scale on the open web (telegraphic, short, function-word-reduced). The English corpus is constructed from four sources:</text:p>
      <text:list text:style-name="L6">
        <text:list-item>
          <text:p text:style-name="P18"><text:span text:style-name="Strong_20_Emphasis">CHILDES</text:span> child-directed and child-produced speech (open licence; closest natural register match) </text:p>
        </text:list-item>
        <text:list-item>
          <text:p text:style-name="P18"><text:span text:style-name="Strong_20_Emphasis">OPUS OpenSubtitles</text:span> filtered to utterances of 3–8 words with profanity and adult-content removal </text:p>
        </text:list-item>
        <text:list-item>
          <text:p text:style-name="P18"><text:span text:style-name="Strong_20_Emphasis">Synthetic AAC text</text:span> generated by a teacher LLM with controlled prompts for AAC register and topic coverage; ~50K utterances </text:p>
        </text:list-item>
        <text:list-item>
          <text:p text:style-name="P17"><text:span text:style-name="Strong_20_Emphasis">ARASAAC pictogram-aligned sentences</text:span> where available, providing direct supervision for the pictogram-prediction task </text:p>
        </text:list-item>
      </text:list>
      <text:p text:style-name="Text_20_body">Target: 200K–500K English utterances. Greek corpus follows the same procedure if pursued as a stretch.</text:p>
      <text:h text:style-name="Heading_20_3" text:outline-level="3">3.3 Pictogram vocabulary (1000 classes)</text:h>
      <text:p text:style-name="Text_20_body">A four-tier structure derived from the AAC core/fringe literature (Banajee 2003, Beukelman 1984, Stuart-Beukelman 1997, Boenisch &amp; Soto 2015):</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Tier</text:p>
            </table:table-cell>
            <table:table-cell table:style-name="Table9.A1" office:value-type="string">
              <text:p text:style-name="Table_20_Heading">Size</text:p>
            </table:table-cell>
            <table:table-cell table:style-name="Table9.A1" office:value-type="string">
              <text:p text:style-name="Table_20_Heading">Description</text:p>
            </table:table-cell>
          </table:table-row>
        </table:table-header-rows>
        <table:table-row>
          <table:table-cell table:style-name="Table9.A1" office:value-type="string">
            <text:p text:style-name="Table_20_Contents">1. Universal core</text:p>
          </table:table-cell>
          <table:table-cell table:style-name="Table9.A1" office:value-type="string">
            <text:p text:style-name="Table_20_Contents">~50</text:p>
          </table:table-cell>
          <table:table-cell table:style-name="Table9.A1" office:value-type="string">
            <text:p text:style-name="Table_20_Contents">Highest-frequency function words and pronouns (I, you, want, more, no, yes, help). Fixed anchor positions on every UI page.</text:p>
          </table:table-cell>
        </table:table-row>
        <table:table-row>
          <table:table-cell table:style-name="Table9.A1" office:value-type="string">
            <text:p text:style-name="Table_20_Contents">2. Adult-conversational</text:p>
          </table:table-cell>
          <table:table-cell table:style-name="Table9.A1" office:value-type="string">
            <text:p text:style-name="Table_20_Contents">~200</text:p>
          </table:table-cell>
          <table:table-cell table:style-name="Table9.A1" office:value-type="string">
            <text:p text:style-name="Table_20_Contents">High-frequency adult vocabulary covering ~78% of typical adult speech.</text:p>
          </table:table-cell>
        </table:table-row>
        <table:table-row>
          <table:table-cell table:style-name="Table9.A1" office:value-type="string">
            <text:p text:style-name="Table_20_Contents">3. Domain-essential</text:p>
          </table:table-cell>
          <table:table-cell table:style-name="Table9.A1" office:value-type="string">
            <text:p text:style-name="Table_20_Contents">~250</text:p>
          </table:table-cell>
          <table:table-cell table:style-name="Table9.A1" office:value-type="string">
            <text:p text:style-name="Table_20_Contents">Emotional, medical, identity, and relationship vocabulary.</text:p>
          </table:table-cell>
        </table:table-row>
        <table:table-row>
          <table:table-cell table:style-name="Table9.A1" office:value-type="string">
            <text:p text:style-name="Table_20_Contents">4. Generic-fringe</text:p>
          </table:table-cell>
          <table:table-cell table:style-name="Table9.A1" office:value-type="string">
            <text:p text:style-name="Table_20_Contents">~200</text:p>
          </table:table-cell>
          <table:table-cell table:style-name="Table9.A1" office:value-type="string">
            <text:p text:style-name="Table_20_Contents">Categorisable vocabulary (food, places, time, weather) accessed via category browsing or prediction.</text:p>
          </table:table-cell>
        </table:table-row>
        <table:table-row>
          <table:table-cell table:style-name="Table9.A1" office:value-type="string">
            <text:p text:style-name="Table_20_Contents">5. User-customisable slots</text:p>
          </table:table-cell>
          <table:table-cell table:style-name="Table9.A1" office:value-type="string">
            <text:p text:style-name="Table_20_Contents">300</text:p>
          </table:table-cell>
          <table:table-cell table:style-name="Table9.A1" office:value-type="string">
            <text:p text:style-name="Table_20_Contents">Empty by default; filled via companion app with personal nouns (family names, pet names, doctor's name).</text:p>
          </table:table-cell>
        </table:table-row>
      </table:table>
      <text:p text:style-name="Text_20_body"><text:soft-page-break/>Pictograms are sourced from ARASAAC (CC BY-NC-SA licence), pre-rendered to 50×50 1-bit dithered images for e-paper and stored on the UNO Q's eMMC.</text:p>
      <text:h text:style-name="Heading_20_3" text:outline-level="3">3.4 User experience</text:h>
      <text:p text:style-name="Text_20_body">The device runs a fixed-grid UI with a separate prediction strip. This design follows a documented AAC user-research finding: AAC users rely heavily on motor-planning consistency (LAMP-style fixed positions), and reordering the main grid by prediction destroys muscle memory.</text:p>
      <text:p text:style-name="Text_20_body">Three input modalities:</text:p>
      <text:list text:style-name="L7">
        <text:list-item>
          <text:p text:style-name="P20"><text:span text:style-name="Strong_20_Emphasis">Pictogram grid mode (primary).</text:span> 3×6 grid with leftmost anchor column fixed across pages; 5-cell prediction strip above; sentence display at top; status bar at bottom. </text:p>
        </text:list-item>
        <text:list-item>
          <text:p text:style-name="P20"><text:span text:style-name="Strong_20_Emphasis">QWERTY mode (secondary).</text:span> For literate users; same prediction strip showing word completions; d-pad navigation. </text:p>
        </text:list-item>
        <text:list-item>
          <text:p text:style-name="P19"><text:span text:style-name="Strong_20_Emphasis">Single-switch scanning (tertiary).</text:span> Row-column scanning with configurable scan rate; BERT-driven prediction prioritisation is most valuable here, where wrong predictions cost seconds of dwell time. </text:p>
        </text:list-item>
      </text:list>
      <text:p text:style-name="Text_20_body">Output: e-paper sentence display + manual-trigger eSpeak-NG TTS through the speaker. The device never speaks unbidden , user dignity requires that the assembled sentence is finalised and committed before voicing.</text:p>
      <text:p text:style-name="Text_20_body">A laminated paper pictogram card slides into a slot in the enclosure, providing a low-tech backup for emergency use and battery-dead states. This addresses documented AAC user failure modes (Boesch et al. 2022, Hurricane Harvey communication study).</text:p>
      <text:h text:style-name="Heading_20_3" text:outline-level="3">3.5 Software development workflow</text:h>
      <text:p text:style-name="Text_20_body">Development uses Arduino App Lab, which is pre-installed on the UNO Q. The Python application running on the QRB2210 and the Arduino/Zephyr sketch running on the STM32U585 are developed in a single unified project. The Bridge library handles inter-processor communication. This substantially reduces development complexity compared to a custom dual-MCU design where two separate toolchains, two flashing procedures, and a custom communication protocol would all need to be implemented and debugged.</text:p>
      <text:p text:style-name="Text_20_body"><text:span text:style-name="Strong_20_Emphasis">Bridge maturity note.</text:span> The Arduino Bridge/Router RPC library is relatively new (launched October 2025) and community documentation is still sparse. Early adopter reports on the Arduino Forum suggest the core RPC mechanism works reliably for simple calls but the ecosystem is still maturing. Our build-phase schedule includes a dedicated Bridge validation task in week 1: if RPC round-trip time exceeds 50 ms or message size limits prevent our display-update protocol, we will fall back to direct UART communication between the two processors using a custom lightweight protocol.</text:p>
      <text:h text:style-name="Heading_20_3" text:outline-level="3">3.6 Software licences and acknowledgements</text:h>
      <text:list text:style-name="L8">
        <text:list-item>
          <text:p text:style-name="P22">Debian Linux (various open-source licences) </text:p>
        </text:list-item>
        <text:list-item>
          <text:p text:style-name="P22">Arduino App Lab and Bridge (Arduino licence) </text:p>
        </text:list-item>
        <text:list-item>
          <text:p text:style-name="P22">DistilmBERT (Apache 2.0) </text:p>
        </text:list-item>
        <text:list-item>
          <text:p text:style-name="P22">ONNX Runtime (MIT) </text:p>
        </text:list-item>
        <text:list-item>
          <text:p text:style-name="P22">ARASAAC pictograms (CC BY-NC-SA 4.0) </text:p>
        </text:list-item>
        <text:list-item>
          <text:p text:style-name="P22"><text:soft-page-break/>eSpeak-NG (GPL v3); application code interfacing with eSpeak-NG is released under GPL v3 </text:p>
        </text:list-item>
        <text:list-item>
          <text:p text:style-name="P21">Hugging Face <text:span text:style-name="Source_20_Text">transformers</text:span> (Apache 2.0) for training infrastructure </text:p>
        </text:list-item>
      </text:list>
      <text:p text:style-name="Horizontal_20_Line"/>
      <text:h text:style-name="Heading_20_2" text:outline-level="2">4. Evaluation plan</text:h>
      <text:p text:style-name="Text_20_body">The project will measure five quantitative metrics:</text:p>
      <text:list text:style-name="L9">
        <text:list-item>
          <text:p text:style-name="P24"><text:span text:style-name="Strong_20_Emphasis">Top-5 next-pictogram prediction accuracy</text:span> on held-out AAC sentences in English. Target: ≥42% (PictoBERT reported 48% with a larger model; our smaller distilled model should achieve at least 42%, which is above the ~40% threshold below which prediction stops being useful). <text:span text:style-name="Emphasis">Stretch:</text:span> same metric for Greek. </text:p>
        </text:list-item>
        <text:list-item>
          <text:p text:style-name="P24"><text:span text:style-name="Strong_20_Emphasis">Words-per-minute</text:span> on a fixed simulated test set of representative phrases ("I want water", "I am in pain", "thank you for visiting"), measured for each input modality. Target: ≥15 WPM in grid mode. (Conservative relative to RoBERTa-AAC's 25.75 WPM because e-paper refresh latency adds ~300 ms per selection.) </text:p>
        </text:list-item>
        <text:list-item>
          <text:p text:style-name="P24"><text:span text:style-name="Strong_20_Emphasis">BERT inference latency</text:span> measured on-device. Target: &lt;500 ms per forward pass. (Based on ARM Cortex-A53 performance estimates for our 15M-parameter INT8 model; validated in build-phase week 2.) </text:p>
        </text:list-item>
        <text:list-item>
          <text:p text:style-name="P24"><text:span text:style-name="Strong_20_Emphasis">End-to-end battery life</text:span> under a realistic duty cycle (8 active hours, 16 idle/suspend hours per day). Target: ≥1.5 days. (Based on measured UNO Q idle power of 0.5 W and estimated average active power of 0.7–1.0 W.) </text:p>
        </text:list-item>
        <text:list-item>
          <text:p text:style-name="P23"><text:span text:style-name="Strong_20_Emphasis">E-paper refresh latency</text:span> for partial and full refresh. </text:p>
        </text:list-item>
      </text:list>
      <text:p text:style-name="Text_20_body">Comparative baselines: 5-gram language model (no neural) and unigram frequency. Including these baselines makes the contribution of the BERT-class model legible and provides a fallback.</text:p>
      <text:p text:style-name="Horizontal_20_Line"/>
      <text:h text:style-name="Heading_20_2" text:outline-level="2">5. Schedule</text:h>
      <text:h text:style-name="Heading_20_3" text:outline-level="3">Phase 1: Foundation (weeks 1–2)</text:h>
      <text:list text:style-name="L10">
        <text:list-item>
          <text:p text:style-name="P26"><text:span text:style-name="Strong_20_Emphasis">English vocabulary derivation.</text:span> 700-word core list from AAC literature; ARASAAC label coverage audit; pictogram pre-rendering at 50×50 1-bit. </text:p>
        </text:list-item>
        <text:list-item>
          <text:p text:style-name="P26"><text:span text:style-name="Strong_20_Emphasis">Corpus construction.</text:span> CHILDES English; OPUS filtering; synthetic AAC text generation. </text:p>
        </text:list-item>
        <text:list-item>
          <text:p text:style-name="P26"><text:span text:style-name="Strong_20_Emphasis">Model distillation and fine-tuning.</text:span> 6-layer student distillation from DistilmBERT teacher; AAC fine-tune; INT8 quantisation; first accuracy evaluation. </text:p>
        </text:list-item>
        <text:list-item>
          <text:p text:style-name="P26"><text:span text:style-name="Strong_20_Emphasis">Hardware procurement.</text:span> Arduino UNO Q 2 GB, 4.2" e-paper, MAX17320 and MP2731 evaluation boards, USB audio adapter, 18650 cells. </text:p>
        </text:list-item>
        <text:list-item>
          <text:p text:style-name="P26"><text:span text:style-name="Strong_20_Emphasis">Bridge validation (week 1, critical).</text:span> Measure Bridge RPC round-trip time and maximum message size; verify display-update command protocol is feasible; if not, begin UART fallback implementation. </text:p>
        </text:list-item>
        <text:list-item>
          <text:p text:style-name="P25"><text:span text:style-name="Strong_20_Emphasis">On-device latency validation (week 2, critical).</text:span> Run first BERT inference on UNO Q; measure latency. If &gt;500 ms, immediately begin model pruning (reduce to 4 layers / 256 hidden). </text:p>
        </text:list-item>
      </text:list>
      <text:h text:style-name="Heading_20_3" text:outline-level="3"><text:soft-page-break/>Phase 2: Integration (weeks 3–4)</text:h>
      <text:list text:style-name="L11">
        <text:list-item>
          <text:p text:style-name="P28"><text:span text:style-name="Strong_20_Emphasis">Linux-side application.</text:span> Python BERT inference loop; UI state management; display-update command protocol; eSpeak-NG integration via USB audio adapter / ALSA; Bridge RPC client. </text:p>
        </text:list-item>
        <text:list-item>
          <text:p text:style-name="P28"><text:span text:style-name="Strong_20_Emphasis">MCU-side firmware.</text:span> Button debouncing; e-paper SPI driver with local bitmap compositing; battery telemetry; Bridge RPC server (or UART fallback). </text:p>
        </text:list-item>
        <text:list-item>
          <text:p text:style-name="P28"><text:span text:style-name="Strong_20_Emphasis">First end-to-end demo.</text:span> Button press → BERT prediction → e-paper update → TTS output. </text:p>
        </text:list-item>
        <text:list-item>
          <text:p text:style-name="P27"><text:span text:style-name="Strong_20_Emphasis">Carrier shield design.</text:span> KiCad schematic and layout for the BMS + peripherals shield; PCB fabrication ordered. </text:p>
        </text:list-item>
      </text:list>
      <text:h text:style-name="Heading_20_3" text:outline-level="3">Phase 3: Polish and evaluation (weeks 5–6)</text:h>
      <text:list text:style-name="L12">
        <text:list-item>
          <text:p text:style-name="P30"><text:span text:style-name="Strong_20_Emphasis">Full UX integration.</text:span> Grid mode, QWERTY mode, switch scanning. </text:p>
        </text:list-item>
        <text:list-item>
          <text:p text:style-name="P30"><text:span text:style-name="Strong_20_Emphasis">Battery life measurement.</text:span> INA226-based power profiling; Linux suspend/resume tuning. </text:p>
        </text:list-item>
        <text:list-item>
          <text:p text:style-name="P30"><text:span text:style-name="Strong_20_Emphasis">Carrier shield assembly and integration.</text:span> Move from breadboard BMS to shield. </text:p>
        </text:list-item>
        <text:list-item>
          <text:p text:style-name="P30"><text:span text:style-name="Strong_20_Emphasis">Evaluation suite.</text:span> All five metrics measured and documented. </text:p>
        </text:list-item>
        <text:list-item>
          <text:p text:style-name="P30"><text:span text:style-name="Strong_20_Emphasis">Enclosure.</text:span> 3D-printed PETG enclosure with button cutouts and screen window. </text:p>
        </text:list-item>
        <text:list-item>
          <text:p text:style-name="P29"><text:span text:style-name="Emphasis">Stretch:</text:span> Greek vocabulary swap, Greek eSpeak voice, Greek model variant. </text:p>
        </text:list-item>
      </text:list>
      <text:h text:style-name="Heading_20_3" text:outline-level="3">Phase 4: Documentation and submission</text:h>
      <text:list text:style-name="L13">
        <text:list-item>
          <text:p text:style-name="P32"><text:span text:style-name="Strong_20_Emphasis">DesignSpark article.</text:span> Full write-up with methodology, results, schematics, and source code links. </text:p>
        </text:list-item>
        <text:list-item>
          <text:p text:style-name="P32"><text:span text:style-name="Strong_20_Emphasis">Open-source release.</text:span> All design files, firmware, model weights, training scripts, and vocabulary derivation methodology published to GitHub. </text:p>
        </text:list-item>
        <text:list-item>
          <text:p text:style-name="P31"><text:span text:style-name="Strong_20_Emphasis">Demonstration video.</text:span> </text:p>
        </text:list-item>
      </text:list>
      <text:h text:style-name="Heading_20_3" text:outline-level="3">Critical-path risks and mitigations</text:h>
      <table:table table:name="Table10" table:style-name="Table10">
        <table:table-column table:style-name="Table10.A"/>
        <table:table-column table:style-name="Table10.B"/>
        <table:table-header-rows>
          <table:table-row>
            <table:table-cell table:style-name="Table10.A1" office:value-type="string">
              <text:p text:style-name="Table_20_Heading">Risk</text:p>
            </table:table-cell>
            <table:table-cell table:style-name="Table10.A1" office:value-type="string">
              <text:p text:style-name="Table_20_Heading">Mitigation</text:p>
            </table:table-cell>
          </table:table-row>
        </table:table-header-rows>
        <table:table-row>
          <table:table-cell table:style-name="Table10.A1" office:value-type="string">
            <text:p text:style-name="Table_20_Contents">BERT inference latency &gt;500 ms on QRB2210</text:p>
          </table:table-cell>
          <table:table-cell table:style-name="Table10.A1" office:value-type="string">
            <text:p text:style-name="Table_20_Contents">Reduce model dimensions further (4 layers, 256 hidden); apply ONNX graph optimisation; explore Qualcomm AI Engine / Hexagon DSP offload if available in the UNO Q's Linux BSP</text:p>
          </table:table-cell>
        </table:table-row>
        <table:table-row>
          <table:table-cell table:style-name="Table10.A1" office:value-type="string">
            <text:p text:style-name="Table_20_Contents">Linux suspend-to-RAM not functional on QRB2210 Debian</text:p>
          </table:table-cell>
          <table:table-cell table:style-name="Table10.A1" office:value-type="string">
            <text:p text:style-name="Table_20_Contents">Fall back to aggressive application-level idle (stop inference loop, release ONNX session memory, blank display); accept ~0.5 W idle instead of target &lt;0.1 W suspended</text:p>
          </table:table-cell>
        </table:table-row>
        <table:table-row>
          <table:table-cell table:style-name="Table10.A1" office:value-type="string">
            <text:p text:style-name="Table_20_Contents">Bridge RPC latency or reliability issues</text:p>
          </table:table-cell>
          <table:table-cell table:style-name="Table10.A1" office:value-type="string">
            <text:p text:style-name="Table_20_Contents">The Bridge library is new and documentation is sparse. Mitigation: validate Bridge round-trip time in week 1; if &gt;50 ms per call, switch to direct UART or SPI communication between the two processors, bypassing the RPC layer</text:p>
          </table:table-cell>
        </table:table-row>
        <table:table-row>
          <table:table-cell table:style-name="Table10.A1" office:value-type="string">
            <text:p text:style-name="Table_20_Contents">Audio via USB adapter introduces latency or compatibility issues</text:p>
          </table:table-cell>
          <table:table-cell table:style-name="Table10.A1" office:value-type="string">
            <text:p text:style-name="Table_20_Contents">Fall back to PWM audio from STM32U585 GPIO (lower quality but functional); or if UNO Media Carrier ships, migrate to JMISC analog audio</text:p>
          </table:table-cell>
        </table:table-row>
        <table:table-row>
          <table:table-cell table:style-name="Table10.A1" office:value-type="string">
            <text:p text:style-name="Table_20_Contents">QRB2210 thermal throttling under sustained inference</text:p>
          </table:table-cell>
          <table:table-cell table:style-name="Table10.A1" office:value-type="string">
            <text:p text:style-name="Table_20_Contents">AAC inference is bursty (sub-second bursts with multi-second gaps), so sustained thermal load is unlikely; if observed, add passive heatsink to SoC or reduce model batch size</text:p>
          </table:table-cell>
        </table:table-row>
        <table:table-row>
          <table:table-cell table:style-name="Table10.A1" office:value-type="string">
            <text:p text:style-name="Table_20_Contents">Battery life under 1 day</text:p>
          </table:table-cell>
          <table:table-cell table:style-name="Table10.A1" office:value-type="string">
            <text:p text:style-name="Table_20_Contents">Larger battery pack (3S configuration or higher-capacity 18650 cells); or accept shorter battery life with fast USB-PD charging</text:p>
          </table:table-cell>
        </table:table-row>
        <text:soft-page-break/>
        <table:table-row>
          <table:table-cell table:style-name="Table10.A1" office:value-type="string">
            <text:p text:style-name="Table_20_Contents">Greek stretch goal not achievable</text:p>
          </table:table-cell>
          <table:table-cell table:style-name="Table10.A1" office:value-type="string">
            <text:p text:style-name="Table_20_Contents">English MVP ships as the committed deliverable; Greek documented as first community contribution</text:p>
          </table:table-cell>
        </table:table-row>
      </table:table>
      <text:p text:style-name="Horizontal_20_Line"/>
      <text:h text:style-name="Heading_20_2" text:outline-level="2">6. Sustainability and social impact</text:h>
      <text:h text:style-name="Heading_20_3" text:outline-level="3">Impact</text:h>
      <text:list text:style-name="L14">
        <text:list-item>
          <text:p text:style-name="P34"><text:span text:style-name="Strong_20_Emphasis">Social.</text:span> The device targets populations whose communication needs are not met by the commercial market , adult AAC users, neurodiverse users, and speakers of underserved languages. The cost gap between OpenAAC (~€161) and commercial AAC (€5,000–€15,000) is the project's primary social-impact lever. </text:p>
        </text:list-item>
        <text:list-item>
          <text:p text:style-name="P33"><text:span text:style-name="Strong_20_Emphasis">Accessibility.</text:span> Three input modalities (grid, QWERTY, single-switch scanning) serve users across the motor-ability spectrum. Offline operation serves users in environments without reliable connectivity. </text:p>
        </text:list-item>
      </text:list>
      <text:h text:style-name="Heading_20_3" text:outline-level="3">Sustainability</text:h>
      <text:list text:style-name="L15">
        <text:list-item>
          <text:p text:style-name="P36"><text:span text:style-name="Strong_20_Emphasis">Repairability.</text:span> Modular design: the UNO Q, e-paper, speaker, and battery are all independently replaceable. Through-hole 18650 holders allow cell replacement without soldering. The carrier shield uses standard through-hole and large SMD components. </text:p>
        </text:list-item>
        <text:list-item>
          <text:p text:style-name="P36"><text:span text:style-name="Strong_20_Emphasis">Reused components.</text:span> 18650 cells sourced from used laptop battery packs (a substantial waste stream); cell selection and matching documented. </text:p>
        </text:list-item>
        <text:list-item>
          <text:p text:style-name="P36"><text:span text:style-name="Strong_20_Emphasis">Material choice.</text:span> Enclosure printed from PETG (recyclable); avoidance of mixed-material assemblies. </text:p>
        </text:list-item>
        <text:list-item>
          <text:p text:style-name="P36"><text:span text:style-name="Strong_20_Emphasis">Open hardware and software.</text:span> All design files released under permissive licences (Apache 2.0, CC BY-NC-SA, GPL v3 as appropriate). The project is structured so that adding a new language is a documented procedure with a script-driven pipeline, enabling community contributions for languages the original team cannot test. </text:p>
        </text:list-item>
        <text:list-item>
          <text:p text:style-name="P35"><text:span text:style-name="Strong_20_Emphasis">Repair documentation.</text:span> A repair manual will be included, written at a level that allows a non-engineer to replace a cell, swap the e-paper, or reflash firmware. </text:p>
        </text:list-item>
      </text:list>
      <text:p text:style-name="Horizontal_20_Line"/>
      <text:h text:style-name="Heading_20_2" text:outline-level="2">7. Innovation and originality</text:h>
      <text:p text:style-name="Text_20_body">OpenAAC integrates several published research lines that have not previously been combined into a working device:</text:p>
      <text:list text:style-name="L16">
        <text:list-item>
          <text:p text:style-name="P38"><text:span text:style-name="Strong_20_Emphasis">BERT-for-AAC prediction</text:span> (PictoBERT, PrAACT, RoBERTa-AAC) , applying transformer-based language models to next-pictogram prediction. </text:p>
        </text:list-item>
        <text:list-item>
          <text:p text:style-name="P38"><text:span text:style-name="Strong_20_Emphasis">Multilingual corpus construction for AAC</text:span> (BERTimbau-AAC) , building AAC-register training data from mixed sources for underserved languages. </text:p>
        </text:list-item>
        <text:list-item>
          <text:p text:style-name="P38"><text:span text:style-name="Strong_20_Emphasis">Right-sized on-device edge AI for assistive technology</text:span> , running a custom distilled BERT model sized specifically for the QRB2210's compute budget: large enough to outperform n-gram baselines substantially, small enough for sub-500 ms interactive inference, and hosted entirely on-device for privacy and offline operation. </text:p>
        </text:list-item>
        <text:list-item>
          <text:p text:style-name="P38"><text:soft-page-break/><text:span text:style-name="Strong_20_Emphasis">The ARASAAC open pictogram set</text:span> , the world's largest open-licence symbol library, supporting 40+ languages. </text:p>
        </text:list-item>
        <text:list-item>
          <text:p text:style-name="P37"><text:span text:style-name="Strong_20_Emphasis">The UNO Q's dual-brain architecture as an assistive-technology platform</text:span> , using the QRB2210 for AI and the STM32U585 for deterministic real-time I/O, demonstrating that the board's design is not just for robotics and vision but also for human communication. </text:p>
        </text:list-item>
      </text:list>
      <text:p text:style-name="Text_20_body">The UNO Q is a particularly strong fit because the AAC use case genuinely needs both brains: the AI processor for language modelling, and the real-time controller for the precise, deterministic input timing that motor-impaired users depend on. This is not a project that could run on either half alone.</text:p>
      <text:p text:style-name="Text_20_body">To our knowledge, no existing AAC device , commercial or research , combines on-device transformer inference with offline operation, hobbyist-affordable BOM, and an architecture designed for extensibility to underserved languages. The closest commercial comparables are 30–60× more expensive and serve a small set of high-resource languages.</text:p>
      <text:p text:style-name="Horizontal_20_Line"/>
      <text:h text:style-name="Heading_20_2" text:outline-level="2">8. Judging criteria alignment</text:h>
      <table:table table:name="Table11" table:style-name="Table11">
        <table:table-column table:style-name="Table11.A"/>
        <table:table-column table:style-name="Table11.B"/>
        <table:table-header-rows>
          <table:table-row>
            <table:table-cell table:style-name="Table11.A1" office:value-type="string">
              <text:p text:style-name="Table_20_Heading">Criterion</text:p>
            </table:table-cell>
            <table:table-cell table:style-name="Table11.A1" office:value-type="string">
              <text:p text:style-name="Table_20_Heading">How OpenAAC addresses it</text:p>
            </table:table-cell>
          </table:table-row>
        </table:table-header-rows>
        <table:table-row>
          <table:table-cell table:style-name="Table11.A1" office:value-type="string">
            <text:p text:style-name="Table_20_Contents"><text:span text:style-name="Strong_20_Emphasis">Innovation</text:span></text:p>
          </table:table-cell>
          <table:table-cell table:style-name="Table11.A1" office:value-type="string">
            <text:p text:style-name="Table_20_Contents">First AAC device combining on-device transformer inference with the UNO Q's dual-brain architecture; purpose-built distilled BERT model sized for the A53's compute budget; novel application of edge AI to assistive communication; multilingual-by-design corpus and model pipeline.</text:p>
          </table:table-cell>
        </table:table-row>
        <table:table-row>
          <table:table-cell table:style-name="Table11.A1" office:value-type="string">
            <text:p text:style-name="Table_20_Contents"><text:span text:style-name="Strong_20_Emphasis">Feasibility</text:span></text:p>
          </table:table-cell>
          <table:table-cell table:style-name="Table11.A1" office:value-type="string">
            <text:p text:style-name="Table_20_Contents">All components are commercially available; software stack runs on standard Debian Linux with well-supported libraries (ONNX Runtime, eSpeak-NG); BOM is under €200; schedule includes explicit risk mitigations.</text:p>
          </table:table-cell>
        </table:table-row>
        <table:table-row>
          <table:table-cell table:style-name="Table11.A1" office:value-type="string">
            <text:p text:style-name="Table_20_Contents"><text:span text:style-name="Strong_20_Emphasis">Demonstration</text:span></text:p>
          </table:table-cell>
          <table:table-cell table:style-name="Table11.A1" office:value-type="string">
            <text:p text:style-name="Table_20_Contents">Five quantitative evaluation metrics with comparative baselines; end-to-end demonstration video showing button-to-speech workflow; open-source repository with reproducible build instructions.</text:p>
          </table:table-cell>
        </table:table-row>
        <table:table-row>
          <table:table-cell table:style-name="Table11.A1" office:value-type="string">
            <text:p text:style-name="Table_20_Contents"><text:span text:style-name="Strong_20_Emphasis">Impact</text:span></text:p>
          </table:table-cell>
          <table:table-cell table:style-name="Table11.A1" office:value-type="string">
            <text:p text:style-name="Table_20_Contents">Serves 70 million people needing AAC worldwide; targets adult neurodiverse users specifically underserved by commercial AAC; 30–60× cost reduction vs. commercial devices; open-source release enables community-driven language expansion.</text:p>
          </table:table-cell>
        </table:table-row>
      </table:table>
      <text:p text:style-name="Horizontal_20_Line"><text:soft-page-break/></text:p>
      <text:h text:style-name="P2" text:outline-level="2"><text:span text:style-name="Emphasis"><text:span text:style-name="T3">9. </text:span></text:span><text:span text:style-name="Emphasis">System block diagram</text:span></text:h>
      <text:p text:style-name="P41"><draw:frame draw:style-name="fr1" draw:name="Frame1" text:anchor-type="char" svg:width="5.628in" draw:z-index="2"><draw:text-box fo:min-height="6.6362in"><text:p text:style-name="Figure"><draw:frame draw:style-name="fr2" draw:name="Image2" text:anchor-type="paragraph" svg:width="5.628in" style:rel-width="100%" svg:height="6.6362in" style:rel-height="scale" draw:z-index="3"><draw:image xlink:href="Pictures/10000001000002E60000036B0E0C0938.png" xlink:type="simple" xlink:show="embed" xlink:actuate="onLoad" draw:mime-type="image/png"/></draw:frame>Figure <text:sequence text:ref-name="refFigure0" text:name="Figure" text:formula="ooow:Figure+1" style:num-format="1">1</text:sequence>: System Block diagram</text:p></draw:text-box></draw:frame><text:span text:style-name="Emphasis"/></text:p>
      <text:p text:style-name="P41"><text:span text:style-name="Emphasis"/></text:p>
      <text:h text:style-name="P2" text:outline-level="2"><text:soft-page-break/><text:span text:style-name="Emphasis"><text:span text:style-name="T3">10. </text:span></text:span><text:span text:style-name="Emphasis">Software architecture and data flow</text:span></text:h>
      <text:p text:style-name="P1"><draw:frame draw:style-name="fr1" draw:name="Frame2" text:anchor-type="char" svg:width="6.1366in" draw:z-index="0"><draw:text-box fo:min-height="6.1366in"><text:p text:style-name="Figure"><draw:frame draw:style-name="fr2" draw:name="Image1" text:anchor-type="paragraph" svg:width="6.1366in" style:rel-width="100%" svg:height="6.1366in" style:rel-height="scale" draw:z-index="1"><draw:image xlink:href="Pictures/1000000100000390000003908A901846.png" xlink:type="simple" xlink:show="embed" xlink:actuate="onLoad" draw:mime-type="image/png"/></draw:frame>Figure <text:sequence text:ref-name="refFigure1" text:name="Figure" text:formula="ooow:Figure+1" style:num-format="1">2</text:sequence>: Software architecture and data flow diagram</text:p></draw:text-box></draw:frame></text:p>
      <text:h text:style-name="Heading_20_2" text:outline-level="2"><text:span text:style-name="T3">11</text:span>. Acknowledgements and references (selected)</text:h>
      <text:list text:style-name="L17">
        <text:list-item>
          <text:p text:style-name="P40">Pereira, J. et al. (2022). <text:span text:style-name="Emphasis">PictoBERT: Transformers for next-pictogram prediction.</text:span> Expert Systems with Applications. </text:p>
        </text:list-item>
        <text:list-item>
          <text:p text:style-name="P40">Banajee, M., DiCarlo, C., &amp; Stricklin, S. (2003). <text:span text:style-name="Emphasis">Core vocabulary determination for toddlers.</text:span> AAC. </text:p>
        </text:list-item>
        <text:list-item>
          <text:p text:style-name="P40">Stuart, S., Beukelman, D., King, J. (1997). <text:span text:style-name="Emphasis">Vocabulary use during extended conversations by older adults.</text:span> AAC. </text:p>
        </text:list-item>
        <text:list-item>
          <text:p text:style-name="P40">Boesch, M. et al. (2022). <text:span text:style-name="Emphasis">Communication during emergency response: AAC users in Hurricane Harvey.</text:span> </text:p>
        </text:list-item>
        <text:list-item>
          <text:p text:style-name="P40">Donaldson et al. (2021). <text:span text:style-name="Emphasis">"Everyone Deserves AAC": Perspectives on AAC across the spectrum of communication ability.</text:span> ASHA Perspectives. </text:p>
        </text:list-item>
        <text:list-item>
          <text:p text:style-name="P40">ARASAAC Pictogram Symbol Set, Government of Aragón, CC BY-NC-SA 4.0, <text:a xlink:type="simple" xlink:href="https://arasaac.org/" office:target-frame-name="_blank" xlink:show="new" text:style-name="Internet_20_link" text:visited-style-name="Visited_20_Internet_20_Link">https://arasaac.org</text:a> </text:p>
        </text:list-item>
        <text:list-item>
          <text:p text:style-name="P40"><text:soft-page-break/>DistilmBERT, Sanh et al., Apache 2.0, <text:a xlink:type="simple" xlink:href="https://huggingface.co/distilbert/distilbert-base-multilingual-cased" office:target-frame-name="_blank" xlink:show="new" text:style-name="Internet_20_link" text:visited-style-name="Visited_20_Internet_20_Link">https://huggingface.co/distilbert/distilbert-base-multilingual-cased</text:a> </text:p>
        </text:list-item>
        <text:list-item>
          <text:p text:style-name="P40">eSpeak-NG, GPL v3, <text:a xlink:type="simple" xlink:href="https://github.com/espeak-ng/espeak-ng" office:target-frame-name="_blank" xlink:show="new" text:style-name="Internet_20_link" text:visited-style-name="Visited_20_Internet_20_Link">https://github.com/espeak-ng/espeak-ng</text:a> </text:p>
        </text:list-item>
        <text:list-item>
          <text:p text:style-name="P40">Geotrend "Load What You Need" multilingual extraction methodology, arXiv:2010.05609 </text:p>
        </text:list-item>
        <text:list-item>
          <text:p text:style-name="P39">Arduino UNO Q documentation, <text:a xlink:type="simple" xlink:href="https://docs.arduino.cc/hardware/uno-q" office:target-frame-name="_blank" xlink:show="new" text:style-name="Internet_20_link" text:visited-style-name="Visited_20_Internet_20_Link">https://docs.arduino.cc/hardware/uno-q</text:a> </text:p>
        </text:list-item>
      </text:list>
      <text:p text:style-name="Horizontal_20_Line"/>
      <text:h text:style-name="Heading_20_2" text:outline-level="2"><text:span text:style-name="Emphasi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4T09:57:25.382123838</meta:creation-date>
    <dc:date>2026-05-04T10:37:01.062439824</dc:date>
    <meta:editing-duration>PT7M33S</meta:editing-duration>
    <meta:editing-cycles>1</meta:editing-cycles>
    <meta:document-statistic meta:table-count="11" meta:image-count="2" meta:object-count="0" meta:page-count="16" meta:paragraph-count="320" meta:word-count="5132" meta:character-count="34661" meta:non-whitespace-character-count="29877"/>
    <meta:generator>LibreOffice/24.2.7.2$Linux_X86_64 LibreOffice_project/420$Build-2</meta:generator>
  </office:meta>
</office:document-meta>
</file>